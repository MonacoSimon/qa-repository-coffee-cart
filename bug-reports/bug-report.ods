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5.502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6.209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3.4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Liberation Serif" style:font-name-asian="DejaVu Sans" style:font-name-complex="Noto Sans Arabic"/>
    </style:style>
    <style:style style:name="ce4" style:family="table-cell" style:parent-style-name="Default">
      <style:table-cell-properties fo:wrap-option="wrap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5" style:family="table-cell" style:parent-style-name="Default" style:data-style-name="N37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Sev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Esperado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videncia</text:p>
          </table:table-cell>
          <table:table-cell table:style-name="ce1" office:value-type="string" calcext:value-type="string">
            <text:p>Fech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UG-001</text:p>
          </table:table-cell>
          <table:table-cell office:value-type="string" calcext:value-type="string">
            <text:p>Al intentar pagar, no se valida no correo ni se envía ningún correo.</text:p>
          </table:table-cell>
          <table:table-cell office:value-type="string" calcext:value-type="string">
            <text:p>Payment detail.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<text:span text:style-name="T1">1. acceder a la página  principal.</text:span></text:p>
            <text:p><text:span text:style-name="T1">2. hacer click sobre uno o varios productos.</text:span></text:p>
            <text:p><text:span text:style-name="T1">3. ir al carrito.</text:span></text:p>
            <text:p><text:span text:style-name="T1">4.  hacer click en total.</text:span></text:p>
            <text:p><text:span text:style-name="T1">5. ingresar correo y nombre.</text:span></text:p>
            <text:p/>
          </table:table-cell>
          <table:table-cell office:value-type="string" calcext:value-type="string">
            <text:p>La página valida la sección del correo y si todo es válido envía un método de pago.</text:p>
          </table:table-cell>
          <table:table-cell office:value-type="string" calcext:value-type="string">
            <text:p>No se validan los datos no el correo, no se envía ningún correo, lo que es normal en una página demo. </text:p>
          </table:table-cell>
          <table:table-cell office:value-type="string" calcext:value-type="string">
            <text:p>bug-reports/evidence/bugs/metodo-pago1.png y metodo-pago2.png</text:p>
            <text:p/>
          </table:table-cell>
          <table:table-cell table:style-name="ce5" office:value-type="date" office:date-value="2026-05-17" calcext:value-type="date">
            <text:p>17/05/2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UG-002</text:p>
          </table:table-cell>
          <table:table-cell office:value-type="string" calcext:value-type="string">
            <text:p>Al encargar una gran cantidad de productos, la pagina sufre una degradación en su tiempo de respuesta.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Med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acceder a la página  principal. </text:p>
            <text:p>2. hacer click sobre varios productos.  </text:p>
          </table:table-cell>
          <table:table-cell office:value-type="string" calcext:value-type="string">
            <text:p>La pagina, al recibir muchos pedidos, mantiene consistencia al recibir pedidos.</text:p>
          </table:table-cell>
          <table:table-cell office:value-type="string" calcext:value-type="string">
            <text:p>La pagina, el sumar un gran numero de productos, va sufriendo una degradación constante en su tiempo de respuesta.</text:p>
          </table:table-cell>
          <table:table-cell office:value-type="string" calcext:value-type="string">
            <text:p>bug-reports/evidence/bugs/relentización.png </text:p>
          </table:table-cell>
          <table:table-cell table:style-name="ce5" office:value-type="date" office:date-value="2026-05-17" calcext:value-type="date">
            <text:p>17/05/26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BUG-003</text:p>
          </table:table-cell>
          <table:table-cell table:style-name="ce3" office:value-type="string" calcext:value-type="string">
            <text:p>Al ingresar a la url <text:a xlink:href="https://coffee-cart.app/?breakable=1" xlink:type="simple">breakable=1</text:a> el carrito aparece roto.</text:p>
          </table:table-cell>
          <table:table-cell table:style-name="ce4" office:value-type="string" calcext:value-type="string">
            <text:p><text:a xlink:href="https://coffee-cart.app/?breakable=1" xlink:type="simple">https://coffee-cart.app/?breakable=1</text:a></text:p>
          </table:table-cell>
          <table:table-cell table:number-columns-repeated="2" office:value-type="string" calcext:value-type="string">
            <text:p>Med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acceder a la url <text:span text:style-name="T2"><text:a xlink:href="https://coffee-cart.app/?breakable=1" xlink:type="simple">https://coffee-cart.app/?breakable=1</text:a></text:span><text:span text:style-name="T2"> </text:span></text:p>
            <text:p><text:span text:style-name="T3">2. acceder a la sección “cart”.</text:span></text:p>
          </table:table-cell>
          <table:table-cell office:value-type="string" calcext:value-type="string">
            <text:p>La pagina tiene una sola url para el carrito y esta es estable.</text:p>
          </table:table-cell>
          <table:table-cell office:value-type="string" calcext:value-type="string">
            <text:p>La pagina cuenta con dos urls para el carrito y una es inestable, la última nombrada.</text:p>
          </table:table-cell>
          <table:table-cell office:value-type="string" calcext:value-type="string">
            <text:p>bug-reports/evidence/bugs/breakable1 y breakable2.png</text:p>
          </table:table-cell>
          <table:table-cell table:style-name="ce5" office:value-type="date" office:date-value="2026-05-17" calcext:value-type="date">
            <text:p>17/05/26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BUG-004</text:p>
          </table:table-cell>
          <table:table-cell office:value-type="string" calcext:value-type="string">
            <text:p>La pagina 404 no existe.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Baj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acceder a la página principal.</text:p>
            <text:p>2. ingresar un / y cualquier palabra. </text:p>
          </table:table-cell>
          <table:table-cell office:value-type="string" calcext:value-type="string">
            <text:p>La pagina tiene una url y una pagina 404 diseñada para indicar que no existe el url buscada.</text:p>
          </table:table-cell>
          <table:table-cell office:value-type="string" calcext:value-type="string">
            <text:p>La pagina muestra el menú y la parte de abajo en blanco sin dar ningún mensaje claro.</text:p>
          </table:table-cell>
          <table:table-cell office:value-type="string" calcext:value-type="string">
            <text:p>bug-reports/evidence/bugs/404.png</text:p>
          </table:table-cell>
          <table:table-cell table:style-name="ce5" office:value-type="date" office:date-value="2026-05-17" calcext:value-type="date">
            <text:p>17/05/26</text:p>
          </table:table-cell>
          <table:table-cell table:number-columns-repeated="9"/>
        </table:table-row>
        <table:table-row table:style-name="ro5" table:number-rows-repeated="38">
          <table:table-cell table:number-columns-repeated="20"/>
        </table:table-row>
        <table:table-row table:style-name="ro5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09:27:03.352177958</meta:creation-date>
    <dc:date>2026-05-17T10:31:00.551511440</dc:date>
    <meta:editing-duration>PT6M31S</meta:editing-duration>
    <meta:editing-cycles>1</meta:editing-cycles>
    <meta:document-statistic meta:table-count="1" meta:cell-count="55" meta:object-count="0"/>
    <meta:generator>LibreOffice/24.2.7.2$Linux_X86_64 LibreOffice_project/420$Build-2</meta:generator>
  </office:meta>
</office:document-meta>
</file>