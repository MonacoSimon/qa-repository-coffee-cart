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4.821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5.09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4" office:value-type="string" calcext:value-type="string">
            <text:p>ACTUAL</text:p>
          </table:table-cell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>
            <text:p>PASS/FAI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C-00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l usuario compra un producto y lo ve reflejado en el precio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</table:table-cell>
          <table:table-cell office:value-type="string" calcext:value-type="string">
            <text:p>1. acceder a la página  principal.</text:p>
            <text:p>2. hacer click sobre un producto. </text:p>
          </table:table-cell>
          <table:table-cell office:value-type="string" calcext:value-type="string">
            <text:p>El precio se ve reflejado en el recuadro de la parte inferior derecha de la pagina.</text:p>
          </table:table-cell>
          <table:table-cell office:value-type="string" calcext:value-type="string">
            <text:p>El precio se ve reflejado de forma efectiva en el recuadro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C-00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l usuario compra varios productos, estos se suman en el carrito. </text:p>
          </table:table-cell>
          <table:table-cell office:value-type="string" calcext:value-type="string">
            <text:p>1. usuario con internet. </text:p>
            <text:p>2. usuario con acceso a un navegador. </text:p>
            <text:p>3. usuario con acceso a la página.</text:p>
          </table:table-cell>
          <table:table-cell office:value-type="string" calcext:value-type="string">
            <text:p>1. acceder a la página <text:s/>principal. 2. hacer click sobre varios productos. </text:p>
          </table:table-cell>
          <table:table-cell office:value-type="string" calcext:value-type="string">
            <text:p>El precio se ve reflejado en el recuadro de la parte inferior derecha de la pagina.</text:p>
          </table:table-cell>
          <table:table-cell office:value-type="string" calcext:value-type="string">
            <text:p>El precio se ve reflejado de forma efectiva en el recuadro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C-003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El usuario ordena varios productos y los ve reflejados en la sección carrito.</text:p>
          </table:table-cell>
          <table:table-cell office:value-type="string" calcext:value-type="string">
            <text:p>1. usuario con internet.</text:p>
            <text:p>2. usuario con acceso a un navegador. </text:p>
            <text:p>3. usuario con acceso a la página.</text:p>
          </table:table-cell>
          <table:table-cell office:value-type="string" calcext:value-type="string">
            <text:p>1. acceder a la página  principal.</text:p>
            <text:p>2. hacer click sobre varios productos.</text:p>
            <text:p>3. ir a la sección “cart”. </text:p>
          </table:table-cell>
          <table:table-cell office:value-type="string" calcext:value-type="string">
            <text:p>Los productos seleccionados deben estar presentes en la sección cart, con sus cantidades y precio. </text:p>
          </table:table-cell>
          <table:table-cell office:value-type="string" calcext:value-type="string">
            <text:p>La cantidad de productos seleccionados y el precio se ven reflejados de forma efectiva en el carrito.</text:p>
          </table:table-cell>
          <table:table-cell office:value-type="string" calcext:value-type="string">
            <text:p>Media 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-004</text:p>
          </table:table-cell>
          <table:table-cell office:value-type="string" calcext:value-type="string">
            <text:p>Payment details</text:p>
          </table:table-cell>
          <table:table-cell office:value-type="string" calcext:value-type="string">
            <text:p>El usuario pide la orden de pago para comprar los productos seleccionados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  <text:p>4. usuario con correo.</text:p>
          </table:table-cell>
          <table:table-cell office:value-type="string" calcext:value-type="string">
            <text:p>1. acceder a la página  principal.</text:p>
            <text:p>2. hacer click sobre uno o varios productos.</text:p>
            <text:p>3. ir al carrito.</text:p>
            <text:p><text:span text:style-name="T1">4.  hacer click en total.</text:span></text:p>
            <text:p><text:span text:style-name="T2">5. ingresar correo y nombre.</text:span></text:p>
          </table:table-cell>
          <table:table-cell office:value-type="string" calcext:value-type="string">
            <text:p>Se deben validar credenciales y enviar un correo con el detalle del pedido y el método de pago claro.</text:p>
          </table:table-cell>
          <table:table-cell office:value-type="string" calcext:value-type="string">
            <text:p>No se validan los datos no el correo, no se envía ningún correo, lo que es normal en una página demo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ail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C-005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l usuario pide una gran cantidad de productos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</table:table-cell>
          <table:table-cell office:value-type="string" calcext:value-type="string">
            <text:p>1. acceder a la página  principal.</text:p>
            <text:p>2. hacer click sobre múltiples productos.</text:p>
          </table:table-cell>
          <table:table-cell office:value-type="string" calcext:value-type="string">
            <text:p>La pagina suma todos los productos y mantiene estabilidad.</text:p>
          </table:table-cell>
          <table:table-cell office:value-type="string" calcext:value-type="string">
            <text:p>La pagina, el sumar un gran numero de productos, va sufriendo una degradación constante en su tiempo de respuesta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Fai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C-006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l usuario en carga dos productos y en el tercero tiene un descuento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</table:table-cell>
          <table:table-cell office:value-type="string" calcext:value-type="string">
            <text:p>1. acceder a la página  principal.</text:p>
            <text:p>2. hacer click sobre tres productos.</text:p>
            <text:p>3. aceptar la oferta que aparece en pantalla.</text:p>
          </table:table-cell>
          <table:table-cell office:value-type="string" calcext:value-type="string">
            <text:p>La pagina al encargar tres productos, el tercero viene con descuento y así consecutivamente.</text:p>
          </table:table-cell>
          <table:table-cell office:value-type="string" calcext:value-type="string">
            <text:p>La pagina ofrece el descuento de manera efectiva al encargar una cierta cantidad de productos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C-00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 hacer click mas de una vez sobre el título de un producto cambia el lenguaje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</table:table-cell>
          <table:table-cell office:value-type="string" calcext:value-type="string">
            <text:p>1. acceder a la página  principal.</text:p>
            <text:p>2. hacer click sobre el título de un producto.</text:p>
          </table:table-cell>
          <table:table-cell office:value-type="string" calcext:value-type="string">
            <text:p>La pagina cambia automáticamente el lenguaje del título de un producto al hacerle click.</text:p>
          </table:table-cell>
          <table:table-cell office:value-type="string" calcext:value-type="string">
            <text:p>La pagina cambia el lenguaje del título de forma efectiva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TC-008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 pasar el mouse por el total aparece un recuadro con un resumen de los productos.</text:p>
          </table:table-cell>
          <table:table-cell office:value-type="string" calcext:value-type="string">
            <text:p>1. usuario con internet.</text:p>
            <text:p>2. usuario con acceso a un navegador.</text:p>
            <text:p>3. usuario con acceso a la página.</text:p>
            <text:p>4. usuario con un producto seleccionado.</text:p>
          </table:table-cell>
          <table:table-cell office:value-type="string" calcext:value-type="string">
            <text:p>1. acceder a la página  principal.</text:p>
            <text:p>2. hacer click sobre un producto.</text:p>
            <text:p>3. pasar el mouse por el botón total.</text:p>
          </table:table-cell>
          <table:table-cell office:value-type="string" calcext:value-type="string">
            <text:p>La pagina muestra el resumen de los productos elegidos.</text:p>
          </table:table-cell>
          <table:table-cell office:value-type="string" calcext:value-type="string">
            <text:p>La pagina muestra el resumen de forma efectiva de los productos seleccionados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5" table:number-rows-repeated="34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09:27:08.769263112</meta:creation-date>
    <dc:date>2026-05-17T10:31:35.287778660</dc:date>
    <meta:editing-duration>PT16M46S</meta:editing-duration>
    <meta:editing-cycles>1</meta:editing-cycles>
    <meta:document-statistic meta:table-count="1" meta:cell-count="81" meta:object-count="0"/>
    <meta:generator>LibreOffice/24.2.7.2$Linux_X86_64 LibreOffice_project/420$Build-2</meta:generator>
  </office:meta>
</office:document-meta>
</file>